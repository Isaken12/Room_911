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Light" svg:font-family="'DejaVu Sans Light'" style:font-adornments="Bold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5.782cm" fo:min-width="3.94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4.512cm" fo:min-width="4.26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4.26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4.513cm" fo:min-width="4.897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3.878cm" fo:min-width="4.262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style:paragraph-properties fo:text-align="start" loext:tab-stop-distance="0cm">
        <style:tab-stops/>
      </style:paragraph-properties>
      <style:text-properties style:font-name="DejaVu Sans Light" fo:font-size="12pt" fo:font-weight="bold"/>
    </style:style>
    <style:style style:name="P2" style:family="paragraph">
      <loext:graphic-properties draw:fill-color="#eeeeee"/>
      <style:paragraph-properties fo:text-align="start" loext:tab-stop-distance="0cm" style:writing-mode="lr-tb">
        <style:tab-stops/>
      </style:paragraph-properties>
      <style:text-properties style:font-name="DejaVu Sans Light" fo:font-size="12pt"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Sans Light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6.032cm" svg:x="7.985cm" svg:y="4.492cm">
          <text:p text:style-name="P1"><text:span text:style-name="T1">Administrator</text:span></text:p>
          <text:p text:style-name="P1"><text:span text:style-name="T1">+id</text:span></text:p>
          <text:p text:style-name="P1"><text:span text:style-name="T1">+user</text:span></text:p>
          <text:p text:style-name="P1"><text:span text:style-name="T1">+password</text:span></text:p>
          <text:p text:style-name="P1"><text:span text:style-name="T1">+created__Dat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4.762cm" svg:x="7.667cm" svg:y="14.97cm">
          <text:p text:style-name="P1"><text:span text:style-name="T1">Employee</text:span></text:p>
          <text:p text:style-name="P1"><text:span text:style-name="T1">+id</text:span></text:p>
          <text:p text:style-name="P1"><text:span text:style-name="T1">+First_name</text:span></text:p>
          <text:p text:style-name="P1"><text:span text:style-name="T1">+Last_name</text:span></text:p>
          <text:p text:style-name="P1"><text:span text:style-name="T1">+department_id</text:span></text:p>
          <text:p text:style-name="P1"><text:span text:style-name="T1">+access_granted</text:span></text:p>
          <text:p text:style-name="P1"><text:span text:style-name="T1">+created_dat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4.445cm" svg:x="2.27cm" svg:y="21.955cm">
          <text:p text:style-name="P1"><text:span text:style-name="T1">Access card</text:span></text:p>
          <text:p text:style-name="P1"><text:span text:style-name="T1">+id</text:span></text:p>
          <text:p text:style-name="P1"><text:span text:style-name="T1">+card_code</text:span></text:p>
          <text:p text:style-name="P1"><text:span text:style-name="T1">+creation_Date</text:span></text:p>
          <text:p text:style-name="P1"><text:span text:style-name="T1">+active</text:span></text:p>
          <text:p text:style-name="P1"><text:span text:style-name="T1">+employee_id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7cm" svg:height="4.763cm" svg:x="13.7cm" svg:y="21.637cm">
          <text:p text:style-name="P1"><text:span text:style-name="T1">Access Attempt</text:span></text:p>
          <text:p text:style-name="P1"><text:span text:style-name="T1">+id</text:span></text:p>
          <text:p text:style-name="P1"><text:span text:style-name="T1">+access_Time</text:span></text:p>
          <text:p text:style-name="P1"><text:span text:style-name="T1">+scanned_card_code</text:span></text:p>
          <text:p text:style-name="P1"><text:span text:style-name="T1">+result</text:span></text:p>
          <text:p text:style-name="P1"><text:span text:style-name="T1">+employee_id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89cm" svg:y1="10.525cm" svg:x2="9.89cm" svg:y2="14.97cm">
          <text:p/>
        </draw:line>
        <draw:line draw:style-name="gr6" draw:text-style-name="P3" draw:layer="layout" svg:x1="7.667cm" svg:y1="19.732cm" svg:x2="7.032cm" svg:y2="21.955cm">
          <text:p/>
        </draw:line>
        <draw:line draw:style-name="gr7" draw:text-style-name="P3" draw:layer="layout" svg:x1="12.43cm" svg:y1="19.732cm" svg:x2="13.7cm" svg:y2="21.637cm">
          <text:p/>
        </draw:line>
        <draw:custom-shape draw:style-name="gr8" draw:text-style-name="P2" draw:layer="layout" svg:width="4.762cm" svg:height="4.128cm" svg:x="13.7cm" svg:y="10.207cm">
          <text:p text:style-name="P1"><text:span text:style-name="T1">Department</text:span></text:p>
          <text:p text:style-name="P1"><text:span text:style-name="T1">+id</text:span></text:p>
          <text:p text:style-name="P1"><text:span text:style-name="T1">+name</text:span></text:p>
          <text:p text:style-name="P1"><text:span text:style-name="T1">+descrip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cm" svg:y1="12.43cm" svg:x2="12.43cm" svg:y2="14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Light" svg:font-family="'DejaVu Sans Light'" style:font-adornments="Bold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style-name="ExtraLight" style:font-family-generic="swiss" style:font-pitch="variable" fo:font-size="12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14:00:35.634385630</meta:creation-date>
    <dc:date>2026-06-11T08:21:59.344128897</dc:date>
    <meta:editing-duration>PT3H10M15S</meta:editing-duration>
    <meta:editing-cycles>6</meta:editing-cycles>
    <meta:generator>LibreOffice/24.2.7.2$Linux_X86_64 LibreOffice_project/420$Build-2</meta:generator>
    <meta:document-statistic meta:object-count="9"/>
  </office:meta>
</office:document-meta>
</file>